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6ab8e" officeooo:paragraph-rsid="001761be"/>
    </style:style>
    <style:style style:name="P2" style:family="paragraph" style:parent-style-name="Subtitle">
      <style:text-properties officeooo:rsid="0016ab8e" officeooo:paragraph-rsid="001be0f9"/>
    </style:style>
    <style:style style:name="P3" style:family="paragraph" style:parent-style-name="Subtitle">
      <style:text-properties fo:font-size="16pt" fo:font-style="italic" fo:font-weight="normal" officeooo:rsid="001b9a39" officeooo:paragraph-rsid="001da037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Text_20_body">
      <style:text-properties fo:font-size="16pt" fo:font-style="italic" fo:font-weight="normal" officeooo:rsid="001b9a39" officeooo:paragraph-rsid="001da037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text-properties officeooo:rsid="0016ab8e" officeooo:paragraph-rsid="0016ab8e"/>
    </style:style>
    <style:style style:name="P6" style:family="paragraph" style:parent-style-name="Text_20_body">
      <style:text-properties officeooo:rsid="0016ab8e" officeooo:paragraph-rsid="0016ab8e"/>
    </style:style>
    <style:style style:name="P7" style:family="paragraph" style:parent-style-name="Subtitle">
      <style:text-properties fo:font-weight="bold" officeooo:rsid="001761be" officeooo:paragraph-rsid="001761be" style:font-weight-asian="bold" style:font-weight-complex="bold"/>
    </style:style>
    <style:style style:name="P8" style:family="paragraph" style:parent-style-name="Subtitle">
      <style:paragraph-properties fo:keep-with-next="always"/>
      <style:text-properties style:font-name="Liberation Sans" fo:font-size="16pt" fo:font-style="italic" fo:font-weight="normal" officeooo:rsid="001b9a39" officeooo:paragraph-rsid="001be0f9" style:font-name-asian="Microsoft YaHei" style:font-size-asian="16pt" style:font-style-asian="italic" style:font-weight-asian="normal" style:font-name-complex="Arial1" style:font-size-complex="16pt" style:font-style-complex="italic" style:font-weight-complex="normal"/>
    </style:style>
    <style:style style:name="P9" style:family="paragraph" style:parent-style-name="Subtitle">
      <style:text-properties style:font-name="Liberation Sans" fo:font-size="16pt" fo:font-style="italic" fo:font-weight="normal" officeooo:rsid="001761be" officeooo:paragraph-rsid="001da037" style:font-name-asian="Microsoft YaHei" style:font-size-asian="16pt" style:font-style-asian="italic" style:font-weight-asian="normal" style:font-name-complex="Arial1" style:font-size-complex="16pt" style:font-style-complex="italic" style:font-weight-complex="normal"/>
    </style:style>
    <style:style style:name="P10" style:family="paragraph" style:parent-style-name="Subtitle">
      <style:text-properties officeooo:rsid="0016ab8e" officeooo:paragraph-rsid="0016ab8e"/>
    </style:style>
    <style:style style:name="P11" style:family="paragraph" style:parent-style-name="Subtitle">
      <style:text-properties style:font-name="Liberation Sans" fo:font-size="16pt" fo:font-style="italic" fo:font-weight="normal" officeooo:rsid="001b9a39" officeooo:paragraph-rsid="001da037" style:font-name-asian="Microsoft YaHei" style:font-size-asian="16pt" style:font-style-asian="italic" style:font-weight-asian="normal" style:font-name-complex="Arial1" style:font-size-complex="16pt" style:font-style-complex="italic" style:font-weight-complex="normal"/>
    </style:style>
    <style:style style:name="P12" style:family="paragraph" style:parent-style-name="Subtitle">
      <style:text-properties officeooo:rsid="0016ab8e" officeooo:paragraph-rsid="0018e6d9"/>
    </style:style>
    <style:style style:name="P13" style:family="paragraph" style:parent-style-name="Subtitle">
      <style:text-properties style:font-name="Liberation Sans" fo:font-size="16pt" fo:font-style="italic" fo:font-weight="normal" officeooo:rsid="001be0f9" officeooo:paragraph-rsid="001da037" style:font-name-asian="Microsoft YaHei" style:font-size-asian="16pt" style:font-style-asian="italic" style:font-weight-asian="normal" style:font-name-complex="Arial1" style:font-size-complex="16pt" style:font-style-complex="italic" style:font-weight-complex="normal"/>
    </style:style>
    <style:style style:name="P14" style:family="paragraph" style:parent-style-name="Text_20_body">
      <style:text-properties officeooo:rsid="0016ab8e" officeooo:paragraph-rsid="0018e6d9"/>
    </style:style>
    <style:style style:name="P15" style:family="paragraph" style:parent-style-name="Subtitle">
      <style:text-properties style:font-name="Liberation Sans" fo:font-size="16pt" fo:font-style="italic" fo:font-weight="normal" officeooo:rsid="001b9a39" officeooo:paragraph-rsid="001be0f9" style:font-name-asian="Microsoft YaHei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1" style:family="text">
      <style:text-properties fo:font-weight="bold" officeooo:rsid="001761be" style:font-weight-asian="bold" style:font-weight-complex="bold"/>
    </style:style>
    <style:style style:name="T2" style:family="text">
      <style:text-properties officeooo:rsid="001761be"/>
    </style:style>
    <style:style style:name="T3" style:family="text">
      <style:text-properties fo:font-size="16pt" fo:font-style="italic" fo:font-weight="normal" officeooo:rsid="001761be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font-size="16pt" fo:font-style="italic" fo:font-weight="normal" officeooo:rsid="0018e6d9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font-size="16pt" fo:font-style="italic" fo:font-weight="normal" officeooo:rsid="001a8c84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officeooo:rsid="001be0f9"/>
    </style:style>
    <style:style style:name="T7" style:family="text">
      <style:text-properties fo:font-style="normal" officeooo:rsid="001be0f9" style:font-style-asian="normal" style:font-style-complex="normal"/>
    </style:style>
    <style:style style:name="T8" style:family="text">
      <style:text-properties officeooo:rsid="001da037"/>
    </style:style>
    <style:style style:name="T9" style:family="text">
      <style:text-properties officeooo:rsid="0018e6d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8e6d9" style:font-weight-asian="normal" style:font-weight-complex="normal"/>
    </style:style>
    <style:style style:name="T12" style:family="text">
      <style:text-properties fo:font-weight="normal" officeooo:rsid="001761be" style:font-weight-asian="normal" style:font-weight-complex="normal"/>
    </style:style>
    <style:style style:name="T13" style:family="text">
      <style:text-properties fo:font-weight="normal" officeooo:rsid="001b9a39" style:font-weight-asian="normal" style:font-weight-complex="normal"/>
    </style:style>
    <style:style style:name="T14" style:family="text">
      <style:text-properties fo:font-weight="bold" officeooo:rsid="0018e6d9" style:font-weight-asian="bold" style:font-weight-complex="bold"/>
    </style:style>
    <style:style style:name="T15" style:family="text">
      <style:text-properties fo:font-weight="bold" officeooo:rsid="001be0f9" style:font-weight-asian="bold" style:font-weight-complex="bold"/>
    </style:style>
    <style:style style:name="T16" style:family="text">
      <style:text-properties fo:font-weight="normal" officeooo:rsid="001be0f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Divine Pantheon</text:p>
      <text:p text:style-name="P1"><text:span text:style-name="T1"/></text:p>
      <text:p text:style-name="P2"><text:span text:style-name="T1">Deus</text:span><text:span text:style-name="T2"> (The Architect)<text:line-break/></text:span><text:span text:style-name="T3">God of </text:span><text:span text:style-name="T4">Creation</text:span><text:span text:style-name="T5"> and Architecture</text:span></text:p>
      <text:p text:style-name="P3"><text:span text:style-name="T6">Magic: </text:span>[Holy]</text:p>
      <text:p text:style-name="P3"><text:span text:style-name="T7">Weapon:</text:span><text:span text:style-name="T6"> [</text:span><text:span text:style-name="T8">Warhammer of Creation</text:span><text:span text:style-name="T6">]</text:span></text:p>
      <text:p text:style-name="P4"/>
      <text:p text:style-name="P5"/>
      <text:p text:style-name="P2"><text:span text:style-name="T1">Velox</text:span><text:span text:style-name="T2"> (The Messenger)<text:line-break/></text:span><text:span text:style-name="T3">God of </text:span><text:span text:style-name="T5">Divination and Agility</text:span></text:p>
      <text:p text:style-name="P3"><text:span text:style-name="T6">Magic: </text:span>[Lightning]</text:p>
      <text:p text:style-name="P3"><text:span text:style-name="T6">Weapon: [</text:span><text:span text:style-name="T8">Bow of Agility</text:span><text:span text:style-name="T6">]</text:span></text:p>
      <text:p text:style-name="P6"/>
      <text:p text:style-name="P2"><text:span text:style-name="T1">Celia</text:span><text:span text:style-name="T2"> (The </text:span><text:span text:style-name="T9">Alchemist</text:span><text:span text:style-name="T2">)<text:line-break/></text:span><text:span text:style-name="T3">God</text:span><text:span text:style-name="T5">dess of Brewing and Alchemy </text:span></text:p>
      <text:p text:style-name="P3"><text:span text:style-name="T6">Magic: </text:span>[Blood]</text:p>
      <text:p text:style-name="P3"><text:span text:style-name="T6">Weapon: [</text:span><text:span text:style-name="T8">Philosopher’s Dagger</text:span><text:span text:style-name="T6">]</text:span></text:p>
      <text:p text:style-name="P6"/>
      <text:p text:style-name="P7">Bella<text:span text:style-name="T10"> (The </text:span><text:span text:style-name="T11">Warrior</text:span><text:span text:style-name="T10">)</text:span></text:p>
      <text:p text:style-name="P8">Goddess of War and Combat </text:p>
      <text:p text:style-name="P9"><text:span text:style-name="T6">Magic: </text:span>[Fire]</text:p>
      <text:p text:style-name="P9"><text:span text:style-name="T6">Weapon: [</text:span><text:span text:style-name="T8">Warmonger’s Sword</text:span><text:span text:style-name="T6">]</text:span></text:p>
      <text:p text:style-name="P6"/>
      <text:p text:style-name="P10"><text:soft-page-break/><text:span text:style-name="T1">Bricoleur </text:span><text:span text:style-name="T12">(</text:span><text:span text:style-name="T13">The Prophet</text:span><text:span text:style-name="T12">)</text:span></text:p>
      <text:p text:style-name="P8">God of Commerce and Contracts </text:p>
      <text:p text:style-name="P11"><text:span text:style-name="T6">Magic: </text:span>[Evocation]</text:p>
      <text:p text:style-name="P11"><text:span text:style-name="T6">Weapon: [</text:span><text:span text:style-name="T8">Peacemaking Staff</text:span><text:span text:style-name="T6">]</text:span></text:p>
      <text:p text:style-name="P6"/>
      <text:p text:style-name="P12"><text:span text:style-name="T14">Ingenium</text:span><text:span text:style-name="T9"> (The Genius)</text:span></text:p>
      <text:p text:style-name="P8">God of the Void and Exploration </text:p>
      <text:p text:style-name="P11"><text:span text:style-name="T6">Magic: </text:span>[Ender]</text:p>
      <text:p text:style-name="P13">Weapon: [<text:span text:style-name="T8">Void Orb</text:span>]</text:p>
      <text:p text:style-name="P14"/>
      <text:p text:style-name="P12"><text:span text:style-name="T14">Venat</text:span><text:span text:style-name="T15">as</text:span><text:span text:style-name="T9"> (The Huntr</text:span><text:span text:style-name="T8">ess</text:span><text:span text:style-name="T9">)</text:span></text:p>
      <text:p text:style-name="P8">Goddess of Nature and the Hunt </text:p>
      <text:p text:style-name="P11"><text:span text:style-name="T6">Magic: </text:span>[Nature]</text:p>
      <text:p text:style-name="P11"><text:span text:style-name="T6">Weapon: </text:span><text:span text:style-name="T8">[Crossbow of the Wild</text:span><text:span text:style-name="T6">]</text:span></text:p>
      <text:p text:style-name="P14"/>
      <text:p text:style-name="P12"><text:span text:style-name="T14">Magnus</text:span><text:span text:style-name="T9"> (The Mage)</text:span></text:p>
      <text:p text:style-name="P8">God of Magic and the Underworld </text:p>
      <text:p text:style-name="P11"><text:span text:style-name="T6">Magic: </text:span>[Eldritch]</text:p>
      <text:p text:style-name="P13">Weapon: [<text:span text:style-name="T8">Book of Magery</text:span>]</text:p>
      <text:p text:style-name="P14"><text:span text:style-name="T14"/></text:p>
      <text:p text:style-name="P12"><text:span text:style-name="T15">Glacia</text:span><text:span text:style-name="T14"> </text:span><text:span text:style-name="T11">(The </text:span><text:span text:style-name="T16">Snowflake</text:span><text:span text:style-name="T11">)</text:span></text:p>
      <text:p text:style-name="P8">Goddess of Winter and the Cold </text:p>
      <text:p text:style-name="P15"><text:span text:style-name="T6">Magic: </text:span>[Ice] <text:span text:style-name="T7">| </text:span><text:span text:style-name="T6">Weapon: [</text:span><text:span text:style-name="T8">Glacial Battleaxe</text:span><text:span text:style-name="T6">]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7-25T17:05:52.738000000</meta:creation-date>
    <dc:date>2026-02-18T21:07:46.668294300</dc:date>
    <meta:editing-duration>PT3H50M13S</meta:editing-duration>
    <meta:editing-cycles>3</meta:editing-cycles>
    <meta:generator>LibreOffice/26.2.0.3$Windows_X86_64 LibreOffice_project/620$Build-3</meta:generator>
    <meta:document-statistic meta:table-count="0" meta:image-count="0" meta:object-count="0" meta:page-count="2" meta:paragraph-count="33" meta:word-count="130" meta:character-count="857" meta:non-whitespace-character-count="753"/>
  </office:meta>
</office:document-meta>
</file>